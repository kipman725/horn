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24.661cm" svg:height="13.871cm" svg:x="24.165cm" svg:y="3.448cm">
            <draw:object draw:notify-on-update-of-ranges="Sheet1.A2:Sheet1.A66 Sheet1.B1:Sheet1.B1 Sheet1.B2:Sheet1.B66 Sheet1.D2:Sheet1.D52 Sheet1.E1:Sheet1.E1 Sheet1.E2:Sheet1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h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v</text:p>
          </table:table-cell>
          <table:table-cell/>
          <table:table-cell office:value-type="string" calcext:value-type="string">
            <text:p>E/C @235.384</text:p>
          </table:table-cell>
          <table:table-cell office:value-type="string" calcext:value-type="string">
            <text:p>InterpZ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111" calcext:value-type="float">
            <text:p>17.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272" calcext:value-type="float">
            <text:p>16.272</text:p>
          </table:table-cell>
          <table:table-cell/>
          <table:table-cell office:value-type="string" calcext:value-type="string">
            <text:p>interpolate and find area</text:p>
          </table:table-cell>
          <table:table-cell office:value-type="float" office:value="0" calcext:value-type="float">
            <text:p>0</text:p>
          </table:table-cell>
          <table:table-cell table:formula="of:=FORECAST(1; OFFSET([.A2]; MATCH(15; [.A2:.A29]; 1); 1; 2; 1); [.A2:.A29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4.162" calcext:value-type="float">
            <text:p>4.162</text:p>
          </table:table-cell>
          <table:table-cell office:value-type="float" office:value="15.443" calcext:value-type="float">
            <text:p>15.443</text:p>
          </table:table-cell>
          <table:table-cell/>
          <table:table-cell office:value-type="float" office:value="4.939" calcext:value-type="float">
            <text:p>4.939</text:p>
          </table:table-cell>
          <table:table-cell office:value-type="float" office:value="18.937" calcext:value-type="float">
            <text:p>18.9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M.MICROSOFT.FORECAST.LINEAR([.H3]; [.B$2:.B$29]; [.A$2:.A$29])" office:value-type="float" office:value="-9.72997201179959" calcext:value-type="float">
            <text:p>-9.72997201179959</text:p>
          </table:table-cell>
        </table:table-row>
        <table:table-row table:style-name="ro1">
          <table:table-cell office:value-type="float" office:value="6.986" calcext:value-type="float">
            <text:p>6.986</text:p>
          </table:table-cell>
          <table:table-cell office:value-type="float" office:value="13.615" calcext:value-type="float">
            <text:p>13.615</text:p>
          </table:table-cell>
          <table:table-cell/>
          <table:table-cell office:value-type="float" office:value="9.409" calcext:value-type="float">
            <text:p>9.409</text:p>
          </table:table-cell>
          <table:table-cell office:value-type="float" office:value="20.786" calcext:value-type="float">
            <text:p>20.7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.MICROSOFT.FORECAST.LINEAR([.H4]; [.B$2:.B$29]; [.A$2:.A$29])" office:value-type="float" office:value="-8.9610020395817" calcext:value-type="float">
            <text:p>-8.9610020395817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11.953" calcext:value-type="float">
            <text:p>11.953</text:p>
          </table:table-cell>
          <table:table-cell/>
          <table:table-cell office:value-type="float" office:value="14.496" calcext:value-type="float">
            <text:p>14.496</text:p>
          </table:table-cell>
          <table:table-cell office:value-type="float" office:value="19.245" calcext:value-type="float">
            <text:p>19.2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.MICROSOFT.FORECAST.LINEAR([.H5]; [.B$2:.B$29]; [.A$2:.A$29])" office:value-type="float" office:value="-8.19203206736381" calcext:value-type="float">
            <text:p>-8.19203206736381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3.615" calcext:value-type="float">
            <text:p>13.615</text:p>
          </table:table-cell>
          <table:table-cell/>
          <table:table-cell office:value-type="float" office:value="20.509" calcext:value-type="float">
            <text:p>20.509</text:p>
          </table:table-cell>
          <table:table-cell office:value-type="float" office:value="16.316" calcext:value-type="float">
            <text:p>16.3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.MICROSOFT.FORECAST.LINEAR([.H6]; [.B$2:.B$29]; [.A$2:.A$29])" office:value-type="float" office:value="-7.42306209514592" calcext:value-type="float">
            <text:p>-7.42306209514592</text:p>
          </table:table-cell>
        </table:table-row>
        <table:table-row table:style-name="ro1">
          <table:table-cell office:value-type="float" office:value="23.218" calcext:value-type="float">
            <text:p>23.218</text:p>
          </table:table-cell>
          <table:table-cell office:value-type="float" office:value="16.57" calcext:value-type="float">
            <text:p>16.57</text:p>
          </table:table-cell>
          <table:table-cell/>
          <table:table-cell office:value-type="float" office:value="27.025" calcext:value-type="float">
            <text:p>27.025</text:p>
          </table:table-cell>
          <table:table-cell office:value-type="float" office:value="14.466" calcext:value-type="float">
            <text:p>14.4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.MICROSOFT.FORECAST.LINEAR([.H7]; [.B$2:.B$29]; [.A$2:.A$29])" office:value-type="float" office:value="-6.65409212292803" calcext:value-type="float">
            <text:p>-6.65409212292803</text:p>
          </table:table-cell>
        </table:table-row>
        <table:table-row table:style-name="ro1">
          <table:table-cell office:value-type="float" office:value="46.445" calcext:value-type="float">
            <text:p>46.445</text:p>
          </table:table-cell>
          <table:table-cell office:value-type="float" office:value="31.38" calcext:value-type="float">
            <text:p>31.38</text:p>
          </table:table-cell>
          <table:table-cell/>
          <table:table-cell office:value-type="float" office:value="34.537" calcext:value-type="float">
            <text:p>34.537</text:p>
          </table:table-cell>
          <table:table-cell office:value-type="float" office:value="11.537" calcext:value-type="float">
            <text:p>11.5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M.MICROSOFT.FORECAST.LINEAR([.H8]; [.B$2:.B$29]; [.A$2:.A$29])" office:value-type="float" office:value="-5.88512215071015" calcext:value-type="float">
            <text:p>-5.88512215071015</text:p>
          </table:table-cell>
        </table:table-row>
        <table:table-row table:style-name="ro1">
          <table:table-cell office:value-type="float" office:value="74.028" calcext:value-type="float">
            <text:p>74.028</text:p>
          </table:table-cell>
          <table:table-cell office:value-type="float" office:value="46.222" calcext:value-type="float">
            <text:p>46.222</text:p>
          </table:table-cell>
          <table:table-cell/>
          <table:table-cell office:value-type="float" office:value="41.782" calcext:value-type="float">
            <text:p>41.782</text:p>
          </table:table-cell>
          <table:table-cell office:value-type="float" office:value="10.766" calcext:value-type="float">
            <text:p>10.7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M.MICROSOFT.FORECAST.LINEAR([.H9]; [.B$2:.B$29]; [.A$2:.A$29])" office:value-type="float" office:value="-5.11615217849226" calcext:value-type="float">
            <text:p>-5.11615217849226</text:p>
          </table:table-cell>
        </table:table-row>
        <table:table-row table:style-name="ro1">
          <table:table-cell office:value-type="float" office:value="100.443" calcext:value-type="float">
            <text:p>100.443</text:p>
          </table:table-cell>
          <table:table-cell office:value-type="float" office:value="61.885" calcext:value-type="float">
            <text:p>61.885</text:p>
          </table:table-cell>
          <table:table-cell/>
          <table:table-cell office:value-type="float" office:value="48.411" calcext:value-type="float">
            <text:p>48.411</text:p>
          </table:table-cell>
          <table:table-cell office:value-type="float" office:value="9.092" calcext:value-type="float">
            <text:p>9.0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M.MICROSOFT.FORECAST.LINEAR([.H10]; [.B$2:.B$29]; [.A$2:.A$29])" office:value-type="float" office:value="-4.34718220627434" calcext:value-type="float">
            <text:p>-4.34718220627434</text:p>
          </table:table-cell>
        </table:table-row>
        <table:table-row table:style-name="ro1">
          <table:table-cell office:value-type="float" office:value="127.132" calcext:value-type="float">
            <text:p>127.132</text:p>
          </table:table-cell>
          <table:table-cell office:value-type="float" office:value="78.039" calcext:value-type="float">
            <text:p>78.039</text:p>
          </table:table-cell>
          <table:table-cell/>
          <table:table-cell office:value-type="float" office:value="54.05" calcext:value-type="float">
            <text:p>54.05</text:p>
          </table:table-cell>
          <table:table-cell office:value-type="float" office:value="9.801" calcext:value-type="float">
            <text:p>9.80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M.MICROSOFT.FORECAST.LINEAR([.H11]; [.B$2:.B$29]; [.A$2:.A$29])" office:value-type="float" office:value="-3.57821223405645" calcext:value-type="float">
            <text:p>-3.57821223405645</text:p>
          </table:table-cell>
        </table:table-row>
        <table:table-row table:style-name="ro1">
          <table:table-cell office:value-type="float" office:value="144.69" calcext:value-type="float">
            <text:p>144.69</text:p>
          </table:table-cell>
          <table:table-cell office:value-type="float" office:value="88.574" calcext:value-type="float">
            <text:p>88.574</text:p>
          </table:table-cell>
          <table:table-cell/>
          <table:table-cell office:value-type="float" office:value="64.177" calcext:value-type="float">
            <text:p>64.177</text:p>
          </table:table-cell>
          <table:table-cell office:value-type="float" office:value="9.023" calcext:value-type="float">
            <text:p>9.0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M.MICROSOFT.FORECAST.LINEAR([.H12]; [.B$2:.B$29]; [.A$2:.A$29])" office:value-type="float" office:value="-2.80924226183856" calcext:value-type="float">
            <text:p>-2.80924226183856</text:p>
          </table:table-cell>
        </table:table-row>
        <table:table-row table:style-name="ro1">
          <table:table-cell office:value-type="float" office:value="180.041" calcext:value-type="float">
            <text:p>180.041</text:p>
          </table:table-cell>
          <table:table-cell office:value-type="float" office:value="109.645" calcext:value-type="float">
            <text:p>109.645</text:p>
          </table:table-cell>
          <table:table-cell/>
          <table:table-cell office:value-type="float" office:value="76.581" calcext:value-type="float">
            <text:p>76.581</text:p>
          </table:table-cell>
          <table:table-cell office:value-type="float" office:value="9.287" calcext:value-type="float">
            <text:p>9.28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3.199" calcext:value-type="float">
            <text:p>203.199</text:p>
          </table:table-cell>
          <table:table-cell office:value-type="float" office:value="122.555" calcext:value-type="float">
            <text:p>122.555</text:p>
          </table:table-cell>
          <table:table-cell/>
          <table:table-cell office:value-type="float" office:value="88.985" calcext:value-type="float">
            <text:p>88.985</text:p>
          </table:table-cell>
          <table:table-cell office:value-type="float" office:value="10.607" calcext:value-type="float">
            <text:p>10.6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5.689" calcext:value-type="float">
            <text:p>235.689</text:p>
          </table:table-cell>
          <table:table-cell office:value-type="float" office:value="142.98" calcext:value-type="float">
            <text:p>142.98</text:p>
          </table:table-cell>
          <table:table-cell/>
          <table:table-cell office:value-type="float" office:value="103.765" calcext:value-type="float">
            <text:p>103.765</text:p>
          </table:table-cell>
          <table:table-cell office:value-type="float" office:value="12.19" calcext:value-type="float">
            <text:p>12.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63.197" calcext:value-type="float">
            <text:p>263.197</text:p>
          </table:table-cell>
          <table:table-cell office:value-type="float" office:value="157.645" calcext:value-type="float">
            <text:p>157.645</text:p>
          </table:table-cell>
          <table:table-cell/>
          <table:table-cell office:value-type="float" office:value="128.837" calcext:value-type="float">
            <text:p>128.837</text:p>
          </table:table-cell>
          <table:table-cell office:value-type="float" office:value="12.454" calcext:value-type="float">
            <text:p>12.4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94.432" calcext:value-type="float">
            <text:p>294.432</text:p>
          </table:table-cell>
          <table:table-cell office:value-type="float" office:value="176.365" calcext:value-type="float">
            <text:p>176.365</text:p>
          </table:table-cell>
          <table:table-cell/>
          <table:table-cell office:value-type="float" office:value="146.255" calcext:value-type="float">
            <text:p>146.255</text:p>
          </table:table-cell>
          <table:table-cell office:value-type="float" office:value="13.246" calcext:value-type="float">
            <text:p>13.2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4.578" calcext:value-type="float">
            <text:p>324.578</text:p>
          </table:table-cell>
          <table:table-cell office:value-type="float" office:value="193.276" calcext:value-type="float">
            <text:p>193.276</text:p>
          </table:table-cell>
          <table:table-cell/>
          <table:table-cell office:value-type="float" office:value="165.521" calcext:value-type="float">
            <text:p>165.521</text:p>
          </table:table-cell>
          <table:table-cell office:value-type="float" office:value="15.885" calcext:value-type="float">
            <text:p>15.8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44.062" calcext:value-type="float">
            <text:p>344.062</text:p>
          </table:table-cell>
          <table:table-cell office:value-type="float" office:value="210.187" calcext:value-type="float">
            <text:p>210.187</text:p>
          </table:table-cell>
          <table:table-cell/>
          <table:table-cell office:value-type="float" office:value="183.467" calcext:value-type="float">
            <text:p>183.467</text:p>
          </table:table-cell>
          <table:table-cell office:value-type="float" office:value="17.469" calcext:value-type="float">
            <text:p>17.4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69.06" calcext:value-type="float">
            <text:p>369.06</text:p>
          </table:table-cell>
          <table:table-cell office:value-type="float" office:value="232.612" calcext:value-type="float">
            <text:p>232.612</text:p>
          </table:table-cell>
          <table:table-cell/>
          <table:table-cell office:value-type="float" office:value="204.346" calcext:value-type="float">
            <text:p>204.346</text:p>
          </table:table-cell>
          <table:table-cell office:value-type="float" office:value="22.072" calcext:value-type="float">
            <text:p>22.07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83.398" calcext:value-type="float">
            <text:p>383.398</text:p>
          </table:table-cell>
          <table:table-cell office:value-type="float" office:value="253.566" calcext:value-type="float">
            <text:p>253.566</text:p>
          </table:table-cell>
          <table:table-cell/>
          <table:table-cell office:value-type="float" office:value="230.359" calcext:value-type="float">
            <text:p>230.359</text:p>
          </table:table-cell>
          <table:table-cell office:value-type="float" office:value="27.393" calcext:value-type="float">
            <text:p>27.39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95.162" calcext:value-type="float">
            <text:p>395.162</text:p>
          </table:table-cell>
          <table:table-cell office:value-type="float" office:value="277.094" calcext:value-type="float">
            <text:p>277.094</text:p>
          </table:table-cell>
          <table:table-cell/>
          <table:table-cell office:value-type="float" office:value="245.435" calcext:value-type="float">
            <text:p>245.435</text:p>
          </table:table-cell>
          <table:table-cell office:value-type="float" office:value="33.157" calcext:value-type="float">
            <text:p>33.1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1.947" calcext:value-type="float">
            <text:p>401.947</text:p>
          </table:table-cell>
          <table:table-cell office:value-type="float" office:value="293.326" calcext:value-type="float">
            <text:p>293.326</text:p>
          </table:table-cell>
          <table:table-cell/>
          <table:table-cell office:value-type="float" office:value="265.428" calcext:value-type="float">
            <text:p>265.428</text:p>
          </table:table-cell>
          <table:table-cell office:value-type="float" office:value="40.458" calcext:value-type="float">
            <text:p>40.4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08.7" calcext:value-type="float">
            <text:p>408.7</text:p>
          </table:table-cell>
          <table:table-cell office:value-type="float" office:value="310.992" calcext:value-type="float">
            <text:p>310.992</text:p>
          </table:table-cell>
          <table:table-cell/>
          <table:table-cell office:value-type="float" office:value="317.031" calcext:value-type="float">
            <text:p>317.031</text:p>
          </table:table-cell>
          <table:table-cell office:value-type="float" office:value="60.608" calcext:value-type="float">
            <text:p>60.60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3.342" calcext:value-type="float">
            <text:p>413.342</text:p>
          </table:table-cell>
          <table:table-cell office:value-type="float" office:value="323.567" calcext:value-type="float">
            <text:p>323.567</text:p>
          </table:table-cell>
          <table:table-cell/>
          <table:table-cell office:value-type="float" office:value="370.602" calcext:value-type="float">
            <text:p>370.602</text:p>
          </table:table-cell>
          <table:table-cell office:value-type="float" office:value="80.916" calcext:value-type="float">
            <text:p>80.9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17.713" calcext:value-type="float">
            <text:p>417.713</text:p>
          </table:table-cell>
          <table:table-cell office:value-type="float" office:value="341.582" calcext:value-type="float">
            <text:p>341.582</text:p>
          </table:table-cell>
          <table:table-cell/>
          <table:table-cell office:value-type="float" office:value="411.885" calcext:value-type="float">
            <text:p>411.885</text:p>
          </table:table-cell>
          <table:table-cell office:value-type="float" office:value="95.168" calcext:value-type="float">
            <text:p>95.1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20.111" calcext:value-type="float">
            <text:p>420.111</text:p>
          </table:table-cell>
          <table:table-cell office:value-type="float" office:value="355.034" calcext:value-type="float">
            <text:p>355.034</text:p>
          </table:table-cell>
          <table:table-cell/>
          <table:table-cell office:value-type="float" office:value="435.476" calcext:value-type="float">
            <text:p>435.476</text:p>
          </table:table-cell>
          <table:table-cell office:value-type="float" office:value="104.506" calcext:value-type="float">
            <text:p>104.5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23.94" calcext:value-type="float">
            <text:p>423.94</text:p>
          </table:table-cell>
          <table:table-cell office:value-type="float" office:value="367.184" calcext:value-type="float">
            <text:p>367.184</text:p>
          </table:table-cell>
          <table:table-cell/>
          <table:table-cell office:value-type="float" office:value="453.169" calcext:value-type="float">
            <text:p>453.169</text:p>
          </table:table-cell>
          <table:table-cell office:value-type="float" office:value="110.896" calcext:value-type="float">
            <text:p>110.89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28.798" calcext:value-type="float">
            <text:p>428.798</text:p>
          </table:table-cell>
          <table:table-cell office:value-type="float" office:value="413.914" calcext:value-type="float">
            <text:p>413.914</text:p>
          </table:table-cell>
          <table:table-cell/>
          <table:table-cell office:value-type="float" office:value="469.368" calcext:value-type="float">
            <text:p>469.368</text:p>
          </table:table-cell>
          <table:table-cell office:value-type="float" office:value="121.217" calcext:value-type="float">
            <text:p>121.21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9.248" calcext:value-type="float">
            <text:p>489.248</text:p>
          </table:table-cell>
          <table:table-cell office:value-type="float" office:value="138.28" calcext:value-type="float">
            <text:p>138.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5.892" calcext:value-type="float">
            <text:p>515.892</text:p>
          </table:table-cell>
          <table:table-cell office:value-type="float" office:value="161.371" calcext:value-type="float">
            <text:p>161.37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8.983" calcext:value-type="float">
            <text:p>538.983</text:p>
          </table:table-cell>
          <table:table-cell office:value-type="float" office:value="180.91" calcext:value-type="float">
            <text:p>180.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4.968" calcext:value-type="float">
            <text:p>554.968</text:p>
          </table:table-cell>
          <table:table-cell office:value-type="float" office:value="192.455" calcext:value-type="float">
            <text:p>192.45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0.51" calcext:value-type="float">
            <text:p>570.51</text:p>
          </table:table-cell>
          <table:table-cell office:value-type="float" office:value="205.777" calcext:value-type="float">
            <text:p>205.7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7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7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7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7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7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7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7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7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7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7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3:12:00.20085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11:44:12.807865400</meta:creation-date>
    <dc:date>2026-04-15T00:00:21.679728100</dc:date>
    <meta:editing-duration>PT11H5M7S</meta:editing-duration>
    <meta:editing-cycles>10</meta:editing-cycles>
    <meta:generator>LibreOffice/26.2.0.3$Windows_X86_64 LibreOffice_project/620$Build-3</meta:generator>
    <meta:document-statistic meta:table-count="1" meta:cell-count="61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62cm" svg:height="13.872cm" xlink:href=".." xlink:type="simple" chart:class="chart:scatter" chart:style-name="ch1">
        <chart:legend chart:legend-position="end" svg:x="23.012cm" svg:y="6.388cm" style:legend-expansion="high" chart:style-name="ch2"/>
        <chart:plot-area chart:style-name="ch3" svg:x="0.493cm" svg:y="0.277cm" svg:width="22.026cm" svg:height="13.318cm">
          <chart:coordinate-region svg:x="1.318cm" svg:y="0.476cm" svg:width="20.912cm" svg:height="12.4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8" chart:values-cell-range-address="Sheet1.E2:Sheet1.E53" chart:label-cell-address="Sheet1.E1:Sheet1.E1" chart:class="chart:scatter">
            <chart:domain table:cell-range-address="Sheet1.D2:Sheet1.D52"/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h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17.111">
                <text:p>17.111</text:p>
                <draw:g>
                  <svg:desc>Sheet1.B2:Sheet1.B66</svg:desc>
                </draw:g>
              </table:table-cell>
              <table:table-cell office:value-type="float" office:value="0">
                <text:p>0</text:p>
                <draw:g>
                  <svg:desc>Sheet1.D2:Sheet1.D52</svg:desc>
                </draw:g>
              </table:table-cell>
              <table:table-cell office:value-type="float" office:value="16.272">
                <text:p>16.272</text:p>
                <draw:g>
                  <svg:desc>Sheet1.E2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62">
                <text:p>4.162</text:p>
              </table:table-cell>
              <table:table-cell office:value-type="float" office:value="15.443">
                <text:p>15.443</text:p>
              </table:table-cell>
              <table:table-cell office:value-type="float" office:value="4.939">
                <text:p>4.939</text:p>
              </table:table-cell>
              <table:table-cell office:value-type="float" office:value="18.937">
                <text:p>18.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86">
                <text:p>6.986</text:p>
              </table:table-cell>
              <table:table-cell office:value-type="float" office:value="13.615">
                <text:p>13.615</text:p>
              </table:table-cell>
              <table:table-cell office:value-type="float" office:value="9.409">
                <text:p>9.409</text:p>
              </table:table-cell>
              <table:table-cell office:value-type="float" office:value="20.786">
                <text:p>20.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14">
                <text:p>11.14</text:p>
              </table:table-cell>
              <table:table-cell office:value-type="float" office:value="11.953">
                <text:p>11.953</text:p>
              </table:table-cell>
              <table:table-cell office:value-type="float" office:value="14.496">
                <text:p>14.496</text:p>
              </table:table-cell>
              <table:table-cell office:value-type="float" office:value="19.245">
                <text:p>19.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5">
                <text:p>17.45</text:p>
              </table:table-cell>
              <table:table-cell office:value-type="float" office:value="13.615">
                <text:p>13.615</text:p>
              </table:table-cell>
              <table:table-cell office:value-type="float" office:value="20.509">
                <text:p>20.509</text:p>
              </table:table-cell>
              <table:table-cell office:value-type="float" office:value="16.316">
                <text:p>16.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18">
                <text:p>23.218</text:p>
              </table:table-cell>
              <table:table-cell office:value-type="float" office:value="16.57">
                <text:p>16.57</text:p>
              </table:table-cell>
              <table:table-cell office:value-type="float" office:value="27.025">
                <text:p>27.025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445">
                <text:p>46.445</text:p>
              </table:table-cell>
              <table:table-cell office:value-type="float" office:value="31.38">
                <text:p>31.38</text:p>
              </table:table-cell>
              <table:table-cell office:value-type="float" office:value="34.537">
                <text:p>34.537</text:p>
              </table:table-cell>
              <table:table-cell office:value-type="float" office:value="11.537">
                <text:p>11.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028">
                <text:p>74.028</text:p>
              </table:table-cell>
              <table:table-cell office:value-type="float" office:value="46.222">
                <text:p>46.222</text:p>
              </table:table-cell>
              <table:table-cell office:value-type="float" office:value="41.782">
                <text:p>41.782</text:p>
              </table:table-cell>
              <table:table-cell office:value-type="float" office:value="10.766">
                <text:p>10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443">
                <text:p>100.443</text:p>
              </table:table-cell>
              <table:table-cell office:value-type="float" office:value="61.885">
                <text:p>61.885</text:p>
              </table:table-cell>
              <table:table-cell office:value-type="float" office:value="48.411">
                <text:p>48.411</text:p>
              </table:table-cell>
              <table:table-cell office:value-type="float" office:value="9.092">
                <text:p>9.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.132">
                <text:p>127.132</text:p>
              </table:table-cell>
              <table:table-cell office:value-type="float" office:value="78.039">
                <text:p>78.039</text:p>
              </table:table-cell>
              <table:table-cell office:value-type="float" office:value="54.05">
                <text:p>54.05</text:p>
              </table:table-cell>
              <table:table-cell office:value-type="float" office:value="9.801">
                <text:p>9.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.69">
                <text:p>144.69</text:p>
              </table:table-cell>
              <table:table-cell office:value-type="float" office:value="88.574">
                <text:p>88.574</text:p>
              </table:table-cell>
              <table:table-cell office:value-type="float" office:value="64.177">
                <text:p>64.177</text:p>
              </table:table-cell>
              <table:table-cell office:value-type="float" office:value="9.023">
                <text:p>9.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.041">
                <text:p>180.041</text:p>
              </table:table-cell>
              <table:table-cell office:value-type="float" office:value="109.645">
                <text:p>109.645</text:p>
              </table:table-cell>
              <table:table-cell office:value-type="float" office:value="76.581">
                <text:p>76.581</text:p>
              </table:table-cell>
              <table:table-cell office:value-type="float" office:value="9.287">
                <text:p>9.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199">
                <text:p>203.199</text:p>
              </table:table-cell>
              <table:table-cell office:value-type="float" office:value="122.555">
                <text:p>122.555</text:p>
              </table:table-cell>
              <table:table-cell office:value-type="float" office:value="88.985">
                <text:p>88.985</text:p>
              </table:table-cell>
              <table:table-cell office:value-type="float" office:value="10.607">
                <text:p>10.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.689">
                <text:p>235.689</text:p>
              </table:table-cell>
              <table:table-cell office:value-type="float" office:value="142.98">
                <text:p>142.98</text:p>
              </table:table-cell>
              <table:table-cell office:value-type="float" office:value="103.765">
                <text:p>103.765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197">
                <text:p>263.197</text:p>
              </table:table-cell>
              <table:table-cell office:value-type="float" office:value="157.645">
                <text:p>157.645</text:p>
              </table:table-cell>
              <table:table-cell office:value-type="float" office:value="128.837">
                <text:p>128.837</text:p>
              </table:table-cell>
              <table:table-cell office:value-type="float" office:value="12.454">
                <text:p>12.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.432">
                <text:p>294.432</text:p>
              </table:table-cell>
              <table:table-cell office:value-type="float" office:value="176.365">
                <text:p>176.365</text:p>
              </table:table-cell>
              <table:table-cell office:value-type="float" office:value="146.255">
                <text:p>146.255</text:p>
              </table:table-cell>
              <table:table-cell office:value-type="float" office:value="13.246">
                <text:p>13.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.578">
                <text:p>324.578</text:p>
              </table:table-cell>
              <table:table-cell office:value-type="float" office:value="193.276">
                <text:p>193.276</text:p>
              </table:table-cell>
              <table:table-cell office:value-type="float" office:value="165.521">
                <text:p>165.521</text:p>
              </table:table-cell>
              <table:table-cell office:value-type="float" office:value="15.885">
                <text:p>15.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4.062">
                <text:p>344.062</text:p>
              </table:table-cell>
              <table:table-cell office:value-type="float" office:value="210.187">
                <text:p>210.187</text:p>
              </table:table-cell>
              <table:table-cell office:value-type="float" office:value="183.467">
                <text:p>183.467</text:p>
              </table:table-cell>
              <table:table-cell office:value-type="float" office:value="17.469">
                <text:p>17.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.06">
                <text:p>369.06</text:p>
              </table:table-cell>
              <table:table-cell office:value-type="float" office:value="232.612">
                <text:p>232.612</text:p>
              </table:table-cell>
              <table:table-cell office:value-type="float" office:value="204.346">
                <text:p>204.346</text:p>
              </table:table-cell>
              <table:table-cell office:value-type="float" office:value="22.072">
                <text:p>22.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3.398">
                <text:p>383.398</text:p>
              </table:table-cell>
              <table:table-cell office:value-type="float" office:value="253.566">
                <text:p>253.566</text:p>
              </table:table-cell>
              <table:table-cell office:value-type="float" office:value="230.359">
                <text:p>230.359</text:p>
              </table:table-cell>
              <table:table-cell office:value-type="float" office:value="27.393">
                <text:p>27.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5.162">
                <text:p>395.162</text:p>
              </table:table-cell>
              <table:table-cell office:value-type="float" office:value="277.094">
                <text:p>277.094</text:p>
              </table:table-cell>
              <table:table-cell office:value-type="float" office:value="245.435">
                <text:p>245.435</text:p>
              </table:table-cell>
              <table:table-cell office:value-type="float" office:value="33.157">
                <text:p>33.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.947">
                <text:p>401.947</text:p>
              </table:table-cell>
              <table:table-cell office:value-type="float" office:value="293.326">
                <text:p>293.326</text:p>
              </table:table-cell>
              <table:table-cell office:value-type="float" office:value="265.428">
                <text:p>265.428</text:p>
              </table:table-cell>
              <table:table-cell office:value-type="float" office:value="40.458">
                <text:p>40.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8.7">
                <text:p>408.7</text:p>
              </table:table-cell>
              <table:table-cell office:value-type="float" office:value="310.992">
                <text:p>310.992</text:p>
              </table:table-cell>
              <table:table-cell office:value-type="float" office:value="317.031">
                <text:p>317.031</text:p>
              </table:table-cell>
              <table:table-cell office:value-type="float" office:value="60.608">
                <text:p>60.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.342">
                <text:p>413.342</text:p>
              </table:table-cell>
              <table:table-cell office:value-type="float" office:value="323.567">
                <text:p>323.567</text:p>
              </table:table-cell>
              <table:table-cell office:value-type="float" office:value="370.602">
                <text:p>370.602</text:p>
              </table:table-cell>
              <table:table-cell office:value-type="float" office:value="80.916">
                <text:p>80.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.713">
                <text:p>417.713</text:p>
              </table:table-cell>
              <table:table-cell office:value-type="float" office:value="341.582">
                <text:p>341.582</text:p>
              </table:table-cell>
              <table:table-cell office:value-type="float" office:value="411.885">
                <text:p>411.885</text:p>
              </table:table-cell>
              <table:table-cell office:value-type="float" office:value="95.168">
                <text:p>95.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.111">
                <text:p>420.111</text:p>
              </table:table-cell>
              <table:table-cell office:value-type="float" office:value="355.034">
                <text:p>355.034</text:p>
              </table:table-cell>
              <table:table-cell office:value-type="float" office:value="435.476">
                <text:p>435.476</text:p>
              </table:table-cell>
              <table:table-cell office:value-type="float" office:value="104.506">
                <text:p>104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.94">
                <text:p>423.94</text:p>
              </table:table-cell>
              <table:table-cell office:value-type="float" office:value="367.184">
                <text:p>367.184</text:p>
              </table:table-cell>
              <table:table-cell office:value-type="float" office:value="453.169">
                <text:p>453.169</text:p>
              </table:table-cell>
              <table:table-cell office:value-type="float" office:value="110.896">
                <text:p>110.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8.798">
                <text:p>428.798</text:p>
              </table:table-cell>
              <table:table-cell office:value-type="float" office:value="413.914">
                <text:p>413.914</text:p>
              </table:table-cell>
              <table:table-cell office:value-type="float" office:value="469.368">
                <text:p>469.368</text:p>
              </table:table-cell>
              <table:table-cell office:value-type="float" office:value="121.217">
                <text:p>121.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.248">
                <text:p>489.248</text:p>
              </table:table-cell>
              <table:table-cell office:value-type="float" office:value="138.28">
                <text:p>138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892">
                <text:p>515.892</text:p>
              </table:table-cell>
              <table:table-cell office:value-type="float" office:value="161.371">
                <text:p>161.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983">
                <text:p>538.983</text:p>
              </table:table-cell>
              <table:table-cell office:value-type="float" office:value="180.91">
                <text:p>180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968">
                <text:p>554.968</text:p>
              </table:table-cell>
              <table:table-cell office:value-type="float" office:value="192.455">
                <text:p>192.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51">
                <text:p>570.51</text:p>
              </table:table-cell>
              <table:table-cell office:value-type="float" office:value="205.777">
                <text:p>205.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